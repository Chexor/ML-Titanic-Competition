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4.3862in"/>
    </style:style>
    <style:style style:name="co5" style:family="table-column">
      <style:table-column-properties fo:break-before="auto" style:column-width="0.5398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1" calcext:value-type="float">
            <text:p>330911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76" calcext:value-type="float">
            <text:p>240276</text:p>
          </table:table-cell>
          <table:table-cell office:value-type="float" office:value="9.6875" calcext:value-type="float">
            <text:p>9.6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54" calcext:value-type="float">
            <text:p>31515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72" calcext:value-type="float">
            <text:p>330972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0" calcext:value-type="float">
            <text:p>34922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4" calcext:value-type="float">
            <text:p>233734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712" calcext:value-type="float">
            <text:p>3427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7" calcext:value-type="float">
            <text:p>31508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8" calcext:value-type="float">
            <text:p>34576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78" calcext:value-type="float">
            <text:p>11377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4" calcext:value-type="float">
            <text:p>37037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.0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0" calcext:value-type="float">
            <text:p>34923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2" calcext:value-type="float">
            <text:p>348122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2" calcext:value-type="float">
            <text:p>34923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16" calcext:value-type="float">
            <text:p>23721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90" calcext:value-type="float">
            <text:p>34709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14" calcext:value-type="float">
            <text:p>334914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3" calcext:value-type="float">
            <text:p>330963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float" office:value="28.5375" calcext:value-type="float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3" calcext:value-type="float">
            <text:p>38265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1" calcext:value-type="float">
            <text:p>34921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7" calcext:value-type="float">
            <text:p>310129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6" calcext:value-type="float">
            <text:p>3593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02" calcext:value-type="float">
            <text:p>3687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8" calcext:value-type="float">
            <text:p>34923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261" calcext:value-type="float">
            <text:p>240261</text:p>
          </table:table-cell>
          <table:table-cell office:value-type="float" office:value="10.7083" calcext:value-type="float">
            <text:p>10.70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44" calcext:value-type="float">
            <text:p>33084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6" calcext:value-type="float">
            <text:p>36485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498" calcext:value-type="float">
            <text:p>34549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6563" calcext:value-type="float">
            <text:p>37656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3" calcext:value-type="float">
            <text:p>35003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1" calcext:value-type="float">
            <text:p>347471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5" calcext:value-type="float">
            <text:p>3652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0" calcext:value-type="float">
            <text:p>34707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float" office:value="7.8208" calcext:value-type="float">
            <text:p>7.8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62" calcext:value-type="float">
            <text:p>38316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4" calcext:value-type="float">
            <text:p>2487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4" calcext:value-type="float">
            <text:p>237734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68" calcext:value-type="float">
            <text:p>330968</text:p>
          </table:table-cell>
          <table:table-cell office:value-type="float" office:value="7.7792" calcext:value-type="float">
            <text:p>7.7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44" calcext:value-type="float">
            <text:p>329944</text:p>
          </table:table-cell>
          <table:table-cell office:value-type="float" office:value="7.2833" calcext:value-type="float">
            <text:p>7.28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7" calcext:value-type="float">
            <text:p>36722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95" calcext:value-type="float">
            <text:p>39209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83" calcext:value-type="float">
            <text:p>36878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5" calcext:value-type="float">
            <text:p>35004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41" calcext:value-type="float">
            <text:p>34244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0" calcext:value-type="float">
            <text:p>113780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6" calcext:value-type="float">
            <text:p>34922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9" calcext:value-type="float">
            <text:p>35040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5" calcext:value-type="float">
            <text:p>34925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9" calcext:value-type="float">
            <text:p>34746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32" calcext:value-type="float">
            <text:p>3354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4" calcext:value-type="float">
            <text:p>220844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office:value-type="float" office:value="8.9625" calcext:value-type="float">
            <text:p>8.9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09" calcext:value-type="float">
            <text:p>235509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5" calcext:value-type="float">
            <text:p>34746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6" calcext:value-type="float">
            <text:p>34706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5" calcext:value-type="float">
            <text:p>65305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34" calcext:value-type="float">
            <text:p>2803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91" calcext:value-type="float">
            <text:p>3470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38" calcext:value-type="float">
            <text:p>113038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24" calcext:value-type="float">
            <text:p>33092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84" calcext:value-type="float">
            <text:p>34268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3" calcext:value-type="float">
            <text:p>35005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.4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4" calcext:value-type="float">
            <text:p>35005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68" calcext:value-type="float">
            <text:p>37036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6" calcext:value-type="float">
            <text:p>3101266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1" calcext:value-type="float">
            <text:p>33097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6" calcext:value-type="float">
            <text:p>35041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7" calcext:value-type="float">
            <text:p>11237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9.325" calcext:value-type="float">
            <text:p>9.3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5" calcext:value-type="float">
            <text:p>34577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1" calcext:value-type="float">
            <text:p>3636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501" calcext:value-type="float">
            <text:p>34550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0" calcext:value-type="float">
            <text:p>35041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.7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5" calcext:value-type="float">
            <text:p>34923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5" calcext:value-type="float">
            <text:p>31509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573" calcext:value-type="float">
            <text:p>3685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5" calcext:value-type="float">
            <text:p>31508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9" calcext:value-type="float">
            <text:p>36485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0" calcext:value-type="float">
            <text:p>382650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1" calcext:value-type="float">
            <text:p>34577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2" calcext:value-type="float">
            <text:p>34920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1" calcext:value-type="float">
            <text:p>113801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7" calcext:value-type="float">
            <text:p>34746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9" calcext:value-type="float">
            <text:p>34707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735" calcext:value-type="float">
            <text:p>237735</text:p>
          </table:table-cell>
          <table:table-cell office:value-type="float" office:value="15.0458" calcext:value-type="float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2" calcext:value-type="float">
            <text:p>31509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3" calcext:value-type="float">
            <text:p>38312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1" calcext:value-type="float">
            <text:p>31509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64" calcext:value-type="float">
            <text:p>3683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4" calcext:value-type="float">
            <text:p>2800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8" calcext:value-type="float">
            <text:p>35040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5" calcext:value-type="float">
            <text:p>34707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8" calcext:value-type="float">
            <text:p>244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0" calcext:value-type="float">
            <text:p>11379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9" calcext:value-type="float">
            <text:p>34922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9" calcext:value-type="float">
            <text:p>1104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3" calcext:value-type="float">
            <text:p>350403</text:p>
          </table:table-cell>
          <table:table-cell office:value-type="float" office:value="7.5792" calcext:value-type="float">
            <text:p>7.5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5" calcext:value-type="float">
            <text:p>34812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6" calcext:value-type="float">
            <text:p>24872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4" calcext:value-type="float">
            <text:p>113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02" calcext:value-type="float">
            <text:p>3684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3" calcext:value-type="float">
            <text:p>31508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3" calcext:value-type="float">
            <text:p>28133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2" calcext:value-type="float">
            <text:p>31515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7" calcext:value-type="float">
            <text:p>29107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713" calcext:value-type="float">
            <text:p>3667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0" calcext:value-type="float">
            <text:p>33091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1" calcext:value-type="float">
            <text:p>34991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8" calcext:value-type="float">
            <text:p>36485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109" calcext:value-type="float">
            <text:p>371109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5" calcext:value-type="float">
            <text:p>34706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2" calcext:value-type="float">
            <text:p>213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5" calcext:value-type="float">
            <text:p>17765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urney, Mr. Alfred (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6" calcext:value-type="float">
            <text:p>286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5" calcext:value-type="float">
            <text:p>334915</text:p>
          </table:table-cell>
          <table:table-cell office:value-type="float" office:value="7.7208" calcext:value-type="float">
            <text:p>7.7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7" calcext:value-type="float">
            <text:p>36523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6" calcext:value-type="float">
            <text:p>34708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9" calcext:value-type="float">
            <text:p>3593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23:18:06.1211931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5-21T23:20:53.339676392</dc:date>
    <meta:editing-duration>PT2M47S</meta:editing-duration>
    <meta:editing-cycles>1</meta:editing-cycles>
    <meta:document-statistic meta:table-count="1" meta:cell-count="14022" meta:object-count="0"/>
  </office:meta>
</office:document-meta>
</file>